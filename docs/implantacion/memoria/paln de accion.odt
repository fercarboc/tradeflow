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0d9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text-properties officeooo:paragraph-rsid="000f0d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 conseguir <text:span text:style-name="Strong_20_Emphasis">3 acuerdos piloto</text:span> con asociaciones o mayoristas que validen TrabFlow con sus instaladores.</text:p>
      <text:p text:style-name="Text_20_body">Ese objetivo es mucho más realista y, además, mucho más potente para futuras ayudas, inversión y ventas.</text:p>
      <text:p text:style-name="Horizontal_20_Line"/>
      <text:h text:style-name="Heading_20_1" text:outline-level="1">Plan de acción</text:h>
      <text:h text:style-name="Heading_20_2" text:outline-level="2">Fase 1 (mañana)</text:h>
      <text:p text:style-name="Text_20_body">Construimos el "kit comercial".</text:p>
      <text:p text:style-name="Text_20_body">Debe quedar terminado en una semana.</text:p>
      <text:h text:style-name="Heading_20_3" text:outline-level="3">1. Dossier institucional</text:h>
      <text:p text:style-name="Text_20_body">15-20 páginas.</text:p>
      <text:p text:style-name="Text_20_body">No técnico.</text:p>
      <text:p text:style-name="Text_20_body">Debe responder únicamente a estas preguntas:</text:p>
      <text:list text:style-name="L1">
        <text:list-item>
          <text:p text:style-name="P3">Qué es TrabFlow. </text:p>
        </text:list-item>
        <text:list-item>
          <text:p text:style-name="P3">Qué problema resuelve. </text:p>
        </text:list-item>
        <text:list-item>
          <text:p text:style-name="P3">Qué gana la asociación. </text:p>
        </text:list-item>
        <text:list-item>
          <text:p text:style-name="P3">Qué gana el instalador. </text:p>
        </text:list-item>
        <text:list-item>
          <text:p text:style-name="P3">Qué hace diferente a TrabFlow. </text:p>
        </text:list-item>
        <text:list-item>
          <text:p text:style-name="P2">Cómo sería un piloto. </text:p>
        </text:list-item>
      </text:list>
      <text:p text:style-name="Horizontal_20_Line"/>
      <text:h text:style-name="Heading_20_3" text:outline-level="3">2. Presentación PowerPoint</text:h>
      <text:p text:style-name="Text_20_body">15 diapositivas.</text:p>
      <text:p text:style-name="Text_20_body">Muy visual.</text:p>
      <text:p text:style-name="Text_20_body">Con muchas capturas.</text:p>
      <text:p text:style-name="Horizontal_20_Line"/>
      <text:h text:style-name="Heading_20_3" text:outline-level="3">3. Demo de 10 minutos</text:h>
      <text:p text:style-name="Text_20_body">Con un recorrido fijo.</text:p>
      <text:p text:style-name="Text_20_body">Sin improvisar.</text:p>
      <text:p text:style-name="Horizontal_20_Line"/>
      <text:h text:style-name="Heading_20_3" text:outline-level="3">4. Landing exclusiva para asociaciones</text:h>
      <text:p text:style-name="Text_20_body">Con un mensaje específico.</text:p>
      <text:p text:style-name="Text_20_body">No la landing pública.</text:p>
      <text:p text:style-name="Horizontal_20_Line"><text:soft-page-break/></text:p>
      <text:h text:style-name="Heading_20_3" text:outline-level="3">5. Vídeo demo</text:h>
      <text:p text:style-name="Text_20_body">5-7 minutos.</text:p>
      <text:p text:style-name="Text_20_body">Grabado.</text:p>
      <text:p text:style-name="Text_20_body">Para enviar antes de la reunión.</text:p>
      <text:p text:style-name="Horizontal_20_Line"/>
      <text:h text:style-name="Heading_20_1" text:outline-level="1">Fase 2</text:h>
      <text:p text:style-name="Text_20_body">Preparar propuestas personalizadas.</text:p>
      <text:p text:style-name="Text_20_body">No enviar el mismo documento a todos.</text:p>
      <text:p text:style-name="Text_20_body">Por ejemplo:</text:p>
      <text:h text:style-name="Heading_20_3" text:outline-level="3">CONAIF</text:h>
      <text:p text:style-name="Text_20_body">Hablar de:</text:p>
      <text:list text:style-name="L2">
        <text:list-item>
          <text:p text:style-name="P5">profesionalización </text:p>
        </text:list-item>
        <text:list-item>
          <text:p text:style-name="P5">normativa </text:p>
        </text:list-item>
        <text:list-item>
          <text:p text:style-name="P5">mantenimiento </text:p>
        </text:list-item>
        <text:list-item>
          <text:p text:style-name="P4">IA técnica </text:p>
        </text:list-item>
      </text:list>
      <text:p text:style-name="Horizontal_20_Line"/>
      <text:h text:style-name="Heading_20_3" text:outline-level="3">FENIE</text:h>
      <text:p text:style-name="Text_20_body">Electricidad.</text:p>
      <text:p text:style-name="Text_20_body">REBT.</text:p>
      <text:p text:style-name="Text_20_body">digitalización.</text:p>
      <text:p text:style-name="Horizontal_20_Line"/>
      <text:h text:style-name="Heading_20_3" text:outline-level="3">SALTOKI</text:h>
      <text:p text:style-name="Text_20_body">Venta de material.</text:p>
      <text:p text:style-name="Text_20_body">Catálogo.</text:p>
      <text:p text:style-name="Text_20_body">Integración.</text:p>
      <text:p text:style-name="Horizontal_20_Line"/>
      <text:h text:style-name="Heading_20_3" text:outline-level="3">SONEPAR</text:h>
      <text:p text:style-name="Text_20_body">Distribución.</text:p>
      <text:p text:style-name="Text_20_body">Pedidos.</text:p>
      <text:p text:style-name="Text_20_body">Mayoristas.</text:p>
      <text:p text:style-name="Horizontal_20_Line"><text:soft-page-break/></text:p>
      <text:h text:style-name="Heading_20_3" text:outline-level="3">OBRAMAT</text:h>
      <text:p text:style-name="Text_20_body">Captación de autónomos.</text:p>
      <text:p text:style-name="Horizontal_20_Line"/>
      <text:p text:style-name="Text_20_body">Cada propuesta debe parecer escrita exclusivamente para ellos.</text:p>
      <text:p text:style-name="Horizontal_20_Line"/>
      <text:h text:style-name="Heading_20_1" text:outline-level="1">Fase 3</text:h>
      <text:p text:style-name="Text_20_body">Contactos.</text:p>
      <text:p text:style-name="Text_20_body">No empezar por correo.</text:p>
      <text:p text:style-name="Text_20_body">Intentar:</text:p>
      <text:list text:style-name="L3">
        <text:list-item>
          <text:p text:style-name="P7">llamada </text:p>
        </text:list-item>
        <text:list-item>
          <text:p text:style-name="P7">LinkedIn </text:p>
        </text:list-item>
        <text:list-item>
          <text:p text:style-name="P7">presentación mutua </text:p>
        </text:list-item>
        <text:list-item>
          <text:p text:style-name="P6">reunión presencial </text:p>
        </text:list-item>
      </text:list>
      <text:p text:style-name="Text_20_body">El correo debe llegar después.</text:p>
      <text:p text:style-name="Horizontal_20_Line"/>
      <text:h text:style-name="Heading_20_1" text:outline-level="1">Fase 4</text:h>
      <text:p text:style-name="Text_20_body">Programa piloto</text:p>
      <text:p text:style-name="Text_20_body">Yo no hablaría de vender.</text:p>
      <text:p text:style-name="Text_20_body">Hablaría de:</text:p>
      <text:h text:style-name="Heading_20_2" text:outline-level="2">Programa Fundadores</text:h>
      <text:p text:style-name="Text_20_body">10 empresas.</text:p>
      <text:p text:style-name="Text_20_body">3 meses.</text:p>
      <text:p text:style-name="Text_20_body">Seguimiento.</text:p>
      <text:p text:style-name="Text_20_body">Reuniones mensuales.</text:p>
      <text:p text:style-name="Text_20_body">Influyen en el desarrollo.</text:p>
      <text:p text:style-name="Text_20_body">Precio preferente futuro.</text:p>
      <text:p text:style-name="Text_20_body">Eso genera sensación de exclusividad.</text:p>
      <text:p text:style-name="Horizontal_20_Line"/>
      <text:h text:style-name="Heading_20_1" text:outline-level="1"><text:soft-page-break/>Lo que prepararía contigo</text:h>
      <text:p text:style-name="Text_20_body">Creo que podemos dejar un material muy profesional.</text:p>
      <text:h text:style-name="Heading_20_2" text:outline-level="2">Documento 1</text:h>
      <text:p text:style-name="Text_20_body">Presentación corporativa.</text:p>
      <text:p text:style-name="Horizontal_20_Line"/>
      <text:h text:style-name="Heading_20_2" text:outline-level="2">Documento 2</text:h>
      <text:p text:style-name="Text_20_body">Dossier para asociaciones.</text:p>
      <text:p text:style-name="Horizontal_20_Line"/>
      <text:h text:style-name="Heading_20_2" text:outline-level="2">Documento 3</text:h>
      <text:p text:style-name="Text_20_body">Propuesta de piloto.</text:p>
      <text:p text:style-name="Horizontal_20_Line"/>
      <text:h text:style-name="Heading_20_2" text:outline-level="2">Documento 4</text:h>
      <text:p text:style-name="Text_20_body">Guion de demo.</text:p>
      <text:p text:style-name="Horizontal_20_Line"/>
      <text:h text:style-name="Heading_20_2" text:outline-level="2">Documento 5</text:h>
      <text:p text:style-name="Text_20_body">Guion de reunión.</text:p>
      <text:p text:style-name="Text_20_body">Qué decir minuto a minuto.</text:p>
      <text:p text:style-name="Horizontal_20_Line"/>
      <text:h text:style-name="Heading_20_2" text:outline-level="2">Documento 6</text:h>
      <text:p text:style-name="Text_20_body">Preguntas difíciles.</text:p>
      <text:p text:style-name="Text_20_body">Por ejemplo:</text:p>
      <text:p text:style-name="Quotations">¿Por qué no usar ChatGPT?</text:p>
      <text:p text:style-name="Quotations">¿Qué pasa con la protección de datos?</text:p>
      <text:p text:style-name="Quotations">¿Cuánto cuesta la IA?</text:p>
      <text:p text:style-name="Quotations">¿Qué diferencia hay con otros programas?</text:p>
      <text:p text:style-name="Quotations">¿Cuándo estará terminado?</text:p>
      <text:p text:style-name="Quotations">¿Quién mantiene el sistema?</text:p>
      <text:p text:style-name="Horizontal_20_Line"><text:soft-page-break/></text:p>
      <text:h text:style-name="Heading_20_2" text:outline-level="2">Documento 7</text:h>
      <text:p text:style-name="Text_20_body">Seguimiento posterior.</text:p>
      <text:p text:style-name="Text_20_body">Correo.</text:p>
      <text:p text:style-name="Text_20_body">PDF.</text:p>
      <text:p text:style-name="Text_20_body">Vídeo.</text:p>
      <text:p text:style-name="Text_20_body">Próximos pasos.</text:p>
      <text:p text:style-name="Horizontal_20_Line"/>
      <text:h text:style-name="Heading_20_2" text:outline-level="2">Documento 8</text:h>
      <text:p text:style-name="Text_20_body">Calendario comercial de 90 días.</text:p>
      <text:p text:style-name="Text_20_body">Con objetivos semanales, reuniones, demostraciones, pilotos y acuerdos.</text:p>
      <text:p text:style-name="Horizontal_20_Line"/>
      <text:p text:style-name="Text_20_body">Creo que este es el momento adecuado para cambiar el foco: dedicar aproximadamente un <text:span text:style-name="Strong_20_Emphasis">80 % del tiempo a desarrollo</text:span> y un <text:span text:style-name="Strong_20_Emphasis">20 % a comercialización</text:span> ya no es lo óptimo. Si el producto cubre el flujo principal (presupuesto, clientes, planificación, facturación y el valor diferencial de la IA), empezaría a invertir mucho más esfuerzo en validar el mercado. Un reparto cercano al <text:span text:style-name="Strong_20_Emphasis">50 % desarrollo y 50 % desarrollo de negocio</text:span> suele ser más útil en esta fase, porque las conversaciones con asociaciones y mayoristas te darán información que probablemente influirá en las siguientes prioridades del producto.</text:p>
      <text:p text:style-name="Text_20_body">Mañana podemos empezar por el primer entregable: un <text:span text:style-name="Strong_20_Emphasis">plan de acción comercial completo</text:span>, con tareas día a día, responsables, documentación necesaria y un calendario de reuniones para las próximas 12 semanas. Ese plan será la hoja de ruta para presentar TrabFlow al sector de forma organizada y profesional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9T09:18:22.659000000</meta:creation-date>
    <dc:date>2026-07-09T09:30:32.546000000</dc:date>
    <meta:editing-duration>PT12M10S</meta:editing-duration>
    <meta:editing-cycles>1</meta:editing-cycles>
    <meta:document-statistic meta:table-count="0" meta:image-count="0" meta:object-count="0" meta:page-count="5" meta:paragraph-count="109" meta:word-count="489" meta:character-count="3116" meta:non-whitespace-character-count="2736"/>
    <meta:generator>LibreOffice/7.4.3.2$Windows_X86_64 LibreOffice_project/1048a8393ae2eeec98dff31b5c133c5f1d08b890</meta:generator>
  </office:meta>
</office:document-meta>
</file>