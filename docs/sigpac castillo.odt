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BB86BC7FE152A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9.562cm" draw:z-index="0"><draw:image xlink:href="Pictures/1000000000000780000004386BB86BC7FE152A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4T12:34:56.530000000</meta:creation-date>
    <dc:date>2026-05-24T12:35:09.852000000</dc:date>
    <meta:editing-duration>PT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